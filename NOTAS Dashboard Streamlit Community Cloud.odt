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Tahoma" svg:font-family="Tahoma" style:font-family-generic="swiss"/>
  </office:font-face-decl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2fe74" officeooo:paragraph-rsid="00166c03"/>
    </style:style>
    <style:style style:name="P2" style:family="paragraph" style:parent-style-name="Text_20_body">
      <style:text-properties officeooo:rsid="00317693" officeooo:paragraph-rsid="00166c03"/>
    </style:style>
    <style:style style:name="P3" style:family="paragraph" style:parent-style-name="Heading_20_1">
      <style:text-properties officeooo:paragraph-rsid="00166c03"/>
    </style:style>
    <style:style style:name="P4" style:family="paragraph" style:parent-style-name="Text_20_body">
      <style:text-properties fo:font-style="italic" officeooo:paragraph-rsid="00166c03"/>
    </style:style>
    <style:style style:name="P5" style:family="paragraph" style:parent-style-name="Horizontal_20_Line">
      <style:text-properties officeooo:paragraph-rsid="00166c03"/>
    </style:style>
    <style:style style:name="P6" style:family="paragraph" style:parent-style-name="Heading_20_2">
      <style:text-properties officeooo:paragraph-rsid="00166c03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66c03"/>
    </style:style>
    <style:style style:name="P8" style:family="paragraph" style:parent-style-name="Quotations">
      <style:text-properties officeooo:paragraph-rsid="00166c03"/>
    </style:style>
    <style:style style:name="P9" style:family="paragraph" style:parent-style-name="Heading_20_3">
      <style:text-properties officeooo:paragraph-rsid="00166c03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Liberation Mono" fo:font-size="10pt" officeooo:paragraph-rsid="00166c03" style:font-name-asian="NSimSun" style:font-size-asian="10pt" style:font-name-complex="Liberation Mono" style:font-size-complex="10pt"/>
    </style:style>
    <style:style style:name="P11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2" style:family="paragraph" style:parent-style-name="Heading_20_2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3" style:family="paragraph" style:parent-style-name="Text_20_body">
      <style:text-properties style:font-name="Liberation Mono" fo:font-size="10pt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margin-top="0cm" fo:margin-bottom="0.499cm" style:contextual-spacing="false"/>
      <style:text-properties fo:font-weight="bold" fo:background-color="#ffff00" style:font-weight-asian="bold" style:font-weight-complex="bold"/>
    </style:style>
    <style:style style:name="P15" style:family="paragraph" style:parent-style-name="Heading_20_3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6" style:family="paragraph" style:parent-style-name="Text_20_body" style:list-style-name="L1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2">
      <style:text-properties officeooo:paragraph-rsid="00166c03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paragraph-rsid="00166c03"/>
    </style:style>
    <style:style style:name="P20" style:family="paragraph" style:parent-style-name="Preformatted_20_Text" style:list-style-name="L2">
      <style:paragraph-properties fo:margin-top="0cm" fo:margin-bottom="0.499cm" style:contextual-spacing="false"/>
      <style:text-properties officeooo:paragraph-rsid="00166c03"/>
    </style:style>
    <style:style style:name="P21" style:family="paragraph" style:parent-style-name="Text_20_body">
      <style:text-properties officeooo:paragraph-rsid="00166c03"/>
    </style:style>
    <style:style style:name="P22" style:family="paragraph" style:parent-style-name="Heading_20_4">
      <style:text-properties officeooo:paragraph-rsid="00166c03"/>
    </style:style>
    <style:style style:name="P23" style:family="paragraph" style:parent-style-name="Text_20_body" style:list-style-name="L3">
      <style:text-properties officeooo:paragraph-rsid="00166c03"/>
    </style:style>
    <style:style style:name="P24" style:family="paragraph" style:parent-style-name="Text_20_body" style:list-style-name="L4">
      <style:text-properties officeooo:paragraph-rsid="00166c03"/>
    </style:style>
    <style:style style:name="P25" style:family="paragraph" style:parent-style-name="Preformatted_20_Text" style:list-style-name="L4">
      <style:paragraph-properties fo:margin-top="0cm" fo:margin-bottom="0.499cm" style:contextual-spacing="false"/>
      <style:text-properties officeooo:paragraph-rsid="00166c03"/>
    </style:style>
    <style:style style:name="P26" style:family="paragraph" style:parent-style-name="Text_20_body" style:list-style-name="L5">
      <style:text-properties officeooo:paragraph-rsid="00166c03"/>
    </style:style>
    <style:style style:name="P27" style:family="paragraph" style:parent-style-name="Preformatted_20_Text" style:list-style-name="L5">
      <style:paragraph-properties fo:margin-top="0cm" fo:margin-bottom="0.499cm" style:contextual-spacing="false"/>
      <style:text-properties officeooo:paragraph-rsid="00166c03"/>
    </style:style>
    <style:style style:name="P28" style:family="paragraph" style:parent-style-name="Text_20_body" style:list-style-name="L6">
      <style:text-properties officeooo:paragraph-rsid="00166c03"/>
    </style:style>
    <style:style style:name="P29" style:family="paragraph" style:parent-style-name="Text_20_body" style:list-style-name="L7">
      <style:text-properties officeooo:paragraph-rsid="00166c03"/>
    </style:style>
    <style:style style:name="P30" style:family="paragraph" style:parent-style-name="Text_20_body" style:list-style-name="L8">
      <style:text-properties officeooo:paragraph-rsid="00166c03"/>
    </style:style>
    <style:style style:name="P31" style:family="paragraph" style:parent-style-name="Text_20_body">
      <style:text-properties officeooo:rsid="0036083c" officeooo:paragraph-rsid="00166c03"/>
    </style:style>
    <style:style style:name="P32" style:family="paragraph" style:parent-style-name="Table_20_Heading">
      <style:paragraph-properties fo:text-align="left" style:justify-single-word="false"/>
      <style:text-properties officeooo:paragraph-rsid="00166c03"/>
    </style:style>
    <style:style style:name="P33" style:family="paragraph" style:parent-style-name="Table_20_Contents">
      <style:text-properties officeooo:paragraph-rsid="00166c03"/>
    </style:style>
    <style:style style:name="P34" style:family="paragraph" style:parent-style-name="Text_20_body" style:list-style-name="L9">
      <style:text-properties officeooo:paragraph-rsid="00166c03"/>
    </style:style>
    <style:style style:name="P35" style:family="paragraph" style:parent-style-name="Text_20_body" style:list-style-name="L9">
      <style:paragraph-properties fo:margin-top="0cm" fo:margin-bottom="0cm" style:contextual-spacing="false"/>
      <style:text-properties officeooo:paragraph-rsid="00166c03"/>
    </style:style>
    <style:style style:name="P36" style:family="paragraph" style:parent-style-name="Text_20_body">
      <style:text-properties officeooo:rsid="0039be95" officeooo:paragraph-rsid="00166c03"/>
    </style:style>
    <style:style style:name="P37" style:family="paragraph" style:parent-style-name="Standard">
      <style:text-properties officeooo:rsid="00166c03" officeooo:paragraph-rsid="00166c03"/>
    </style:style>
    <style:style style:name="P38" style:family="paragraph" style:parent-style-name="Text_20_body" style:list-style-name="L10"/>
    <style:style style:name="T1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2" style:family="text">
      <style:text-properties officeooo:rsid="0032fe74"/>
    </style:style>
    <style:style style:name="T3" style:family="text">
      <style:text-properties style:text-line-through-style="none" style:text-line-through-type="none" fo:font-family="'Google Sans', Arial, sans-serif" fo:font-size="12pt" style:text-underline-style="none" fo:font-weight="bold" style:text-blinking="false" loext:padding="0cm" loext:border="none"/>
    </style:style>
    <style:style style:name="T4" style:family="text">
      <style:text-properties officeooo:rsid="00317693"/>
    </style:style>
    <style:style style:name="T5" style:family="text">
      <style:text-properties style:font-name="Liberation Mono"/>
    </style:style>
    <style:style style:name="T6" style:family="text">
      <style:text-properties fo:font-weight="bold"/>
    </style:style>
    <style:style style:name="T7" style:family="text">
      <style:text-properties fo:font-style="italic"/>
    </style:style>
    <style:style style:name="T8" style:family="text">
      <style:text-properties style:font-name="Liberation Mono" fo:font-weight="bold"/>
    </style:style>
    <style:style style:name="T9" style:family="text">
      <style:text-properties style:font-name="Liberation Mono" fo:background-color="#ffff00" loext:char-shading-value="0"/>
    </style:style>
    <style:style style:name="T10" style:family="text">
      <style:text-properties officeooo:rsid="00166c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shboard Streamlit Community Cloud</text:p>
      <text:p text:style-name="Standard"/>
      <text:p text:style-name="Standard"/>
      <text:p text:style-name="P1">Qwen:</text:p>
      <text:p text:style-name="P1">Desenvolver agora o:</text:p>
      <text:p text:style-name="P2">Dashboard Streamlit Community Cloud grátis</text:p>
      <text:p text:style-name="P2">usar uma biblioteca externa chamada <text:span text:style-name="Source_20_Text"><text:span text:style-name="T1">streamlit-authenticator</text:span></text:span></text:p>
      <text:p text:style-name="P2">gera<text:span text:style-name="T2">r</text:span> um <text:span text:style-name="Strong_20_Emphasis"><text:span text:style-name="T3">formulário de login visualmente bonito</text:span></text:span> com campos de utilizador, password e botão de "Logout".</text:p>
      <text:p text:style-name="P1">E mais tarde fazer também a migração para <text:span text:style-name="T4"><text:s/>GitHub</text:span>( porque já tenho uma pagina <text:a xlink:type="simple" xlink:href="https://mpmendespt.github.io/Pesquisas/app/login.html" text:style-name="Internet_20_link" text:visited-style-name="Visited_20_Internet_20_Link">https://mpmendespt.github.io/Pesquisas/app/login.html</text:a> )</text:p>
      <text:p text:style-name="P2"/>
      <text:p text:style-name="P2">……….</text:p>
      <text:h text:style-name="P3" text:outline-level="1">📊 Dashboard Streamlit para Previsão de Pesca v3.1</text:h>
      <text:p text:style-name="P4">(Compatível com Streamlit Community Cloud + streamlit-authenticator + GitHub)</text:p>
      <text:p text:style-name="P5"/>
      <text:h text:style-name="P6" text:outline-level="2">🗂️ Estrutura de Ficheiros para o Repositório GitHub</text:h>
      <text:p text:style-name="P7">github.com/mpmendespt/pesca-dashboard/<text:line-break/>├── .streamlit/<text:line-break/>│ <text:s text:c="2"/>└── config.toml <text:s text:c="13"/># Configuração do Streamlit<text:line-break/>├── assets/<text:line-break/>│ <text:s text:c="2"/>├── logo_pesca.png <text:s text:c="10"/># Logo opcional<text:line-break/>│ <text:s text:c="2"/>└── styles.css <text:s text:c="14"/># CSS personalizado para login bonito<text:line-break/>├── data/<text:line-break/>│ <text:s text:c="2"/>├── credentials.yml <text:s text:c="9"/># Utilizadores e passwords (hash SHA-256)<text:line-break/>│ <text:s text:c="2"/>└── config_cloud.json <text:s text:c="7"/># Configs específicas para cloud (paths relativos)<text:line-break/>├── src/<text:line-break/>│ <text:s text:c="2"/>├── __init__.py<text:line-break/>│ <text:s text:c="2"/>├── auth.py <text:s text:c="17"/># Gestão de autenticação (streamlit-authenticator)<text:line-break/>│ <text:s text:c="2"/>├── data_loader.py <text:s text:c="10"/># Leitura de SQLite/JSON/CSV (com fallback cloud)<text:line-break/>│ <text:s text:c="2"/>├── ml_utils.py <text:s text:c="13"/># Carregamento do modelo .pkl e inferência<text:line-break/>│ <text:s text:c="2"/>├── plots.py <text:s text:c="16"/># Funções de visualização (Plotly/Matplotlib)<text:line-break/>│ <text:s text:c="2"/>└── utils.py <text:s text:c="16"/># Helpers: formatação, cache, logging<text:line-break/>├── pages/<text:line-break/>│ <text:s text:c="2"/>├── 1_📈_Histórico.py <text:s text:c="7"/># Gráficos de capturas + evolução lunar<text:line-break/>│ <text:s text:c="2"/>├── 2_🔮_Previsão.py <text:s text:c="8"/># Score ML + condições de amanhã<text:line-break/>│ <text:s text:c="2"/>├── 3_⚙️_Configurações.py <text:s text:c="3"/># Gestão de utilizadores + limiares<text:line-break/>│ <text:s text:c="2"/>└── 4_📥_Importar.py <text:s text:c="8"/># Upload de Capturas.csv manual<text:line-break/>├── .gitignore<text:line-break/>├── requirements.txt <text:s text:c="12"/># Dependências Python<text:line-break/>├── streamlit_app.py <text:s text:c="12"/># Página principal (login + router)<text:line-break/><text:soft-page-break/>├── README.md <text:s text:c="19"/># Instruções de deploy<text:line-break/>└── deploy_cloud.sh <text:s text:c="13"/># Script opcional para sync com Dropbox/Google Drive</text:p>
      <text:p text:style-name="P5"/>
      <text:h text:style-name="P6" text:outline-level="2">🔐 1. <text:span text:style-name="T5">requirements.txt</text:span> (Dependências)</text:h>
      <text:p text:style-name="P7">streamlit&gt;=1.32.0<text:line-break/>streamlit-authenticator&gt;=0.3.2<text:line-break/>pandas&gt;=2.0.0<text:line-break/>numpy&gt;=1.24.0<text:line-break/>plotly&gt;=5.18.0<text:line-break/>matplotlib&gt;=3.7.0<text:line-break/>scikit-learn&gt;=1.3.0<text:line-break/>pyyaml&gt;=6.0.1<text:line-break/>python-dateutil&gt;=2.8.2<text:line-break/>gspread&gt;=5.12.0 <text:s/># Opcional: sync com Google Sheets<text:line-break/>dropbox&gt;=11.36.0 <text:s/># Opcional: sync com Dropbox</text:p>
      <text:p text:style-name="P5"/>
      <text:h text:style-name="P6" text:outline-level="2">🔐 2. <text:span text:style-name="T5">data/credentials.yml</text:span> (Autenticação)</text:h>
      <text:p text:style-name="P7"># ⚠️ NUNCA commitar passwords em claro. Use hash SHA-256.<text:line-break/># Para gerar hash: python -c "import hashlib; print(hashlib.sha256('sua_senha'.encode()).hexdigest())"<text:line-break/><text:line-break/>credentials:<text:line-break/> <text:s/>usernames:<text:line-break/> <text:s text:c="3"/>mpmendespt:<text:line-break/> <text:s text:c="5"/>email: mpmendespt@gmail.com<text:line-break/> <text:s text:c="5"/>name: Manuel Mendes<text:line-break/> <text:s text:c="5"/>password: $2b$12$abc123... <text:s/># Hash bcrypt (gerado via streamlit-authenticator)<text:line-break/> <text:s text:c="5"/>logged_in: False<text:line-break/> <text:s text:c="3"/>admin:<text:line-break/> <text:s text:c="5"/>email: admin@pesca.local<text:line-break/> <text:s text:c="5"/>name: Administrador<text:line-break/> <text:s text:c="5"/>password: $2b$12$xyz789...<text:line-break/> <text:s text:c="5"/>logged_in: False<text:line-break/><text:line-break/>cookie:<text:line-break/> <text:s/>expiry_days: 30<text:line-break/> <text:s/>key: pesca_dashboard_secret_key <text:s/># Alterar para string aleatória longa<text:line-break/> <text:s/>name: pesca_session<text:line-break/><text:line-break/>pre-authorized:<text:line-break/> <text:s/>emails:<text:line-break/> <text:s text:c="3"/>- mpmendespt@gmail.com</text:p>
      <text:p text:style-name="P8">💡 <text:span text:style-name="T6">Como gerar hashes seguros</text:span>:</text:p>
      <text:p text:style-name="P7">import streamlit_authenticator as stauth<text:line-break/>hashed_passwords = stauth.Hasher(['senha123', 'admin456']).generate()<text:line-break/>print(hashed_passwords) <text:s/># Copie para credentials.yml</text:p>
      <text:p text:style-name="P5"/>
      <text:h text:style-name="P6" text:outline-level="2"><text:soft-page-break/>🔐 3. <text:span text:style-name="T5">src/auth.py</text:span> (Gestão de Autenticação)</text:h>
      <text:p text:style-name="P7">import streamlit as st<text:line-break/>import streamlit_authenticator as stauth<text:line-break/>import yaml<text:line-break/>from yaml.loader import SafeLoader<text:line-break/>from pathlib import Path<text:line-break/>import os<text:line-break/><text:line-break/>CREDENTIALS_FILE = Path(__file__).parent.parent / "data" / "credentials.yml"<text:line-break/><text:line-break/>@st.cache_resource<text:line-break/>def load_authenticator():<text:line-break/> <text:s text:c="3"/>"""Carrega configuracao de autenticação com cache para performance."""<text:line-break/> <text:s text:c="3"/>if not CREDENTIALS_FILE.exists():<text:line-break/> <text:s text:c="7"/>st.error(f"❌ Ficheiro de credenciais não encontrado: {CREDENTIALS_FILE}")<text:line-break/> <text:s text:c="7"/>st.stop()<text:line-break/> <text:s text:c="3"/><text:line-break/> <text:s text:c="3"/>with open(CREDENTIALS_FILE, 'r', encoding='utf-8') as f:<text:line-break/> <text:s text:c="7"/>config = yaml.load(f, Loader=SafeLoader)<text:line-break/> <text:s text:c="3"/><text:line-break/> <text:s text:c="3"/>authenticator = stauth.Authenticate(<text:line-break/> <text:s text:c="7"/>config['credentials'],<text:line-break/> <text:s text:c="7"/>config['cookie']['name'],<text:line-break/> <text:s text:c="7"/>config['cookie']['key'],<text:line-break/> <text:s text:c="7"/>config['cookie']['expiry_days'],<text:line-break/> <text:s text:c="7"/>config.get('pre-authorized', {})<text:line-break/> <text:s text:c="3"/>)<text:line-break/> <text:s text:c="3"/>return authenticator<text:line-break/><text:line-break/>def login_page():<text:line-break/> <text:s text:c="3"/>"""Página de login visualmente personalizada."""<text:line-break/> <text:s text:c="3"/>st.set_page_config(page_title="🎣 Pesca Dashboard", page_icon="🎣", layout="wide")<text:line-break/> <text:s text:c="3"/><text:line-break/> <text:s text:c="3"/># CSS personalizado para login bonito<text:line-break/> <text:s text:c="3"/>st.markdown("""<text:line-break/> <text:s text:c="3"/>&lt;style&gt;<text:line-break/> <text:s text:c="7"/>.stApp { background: linear-gradient(135deg, #1a3a5c 0%, #2e6da4 100%); }<text:line-break/> <text:s text:c="7"/>.login-box { <text:line-break/> <text:s text:c="11"/>background: white; <text:line-break/> <text:s text:c="11"/>padding: 2rem; <text:line-break/> <text:s text:c="11"/>border-radius: 1rem; <text:line-break/> <text:s text:c="11"/>box-shadow: 0 8px 32px rgba(0,0,0,0.2);<text:line-break/> <text:s text:c="11"/>max-width: 400px; <text:line-break/> <text:s text:c="11"/>margin: 3rem auto;<text:line-break/> <text:s text:c="7"/>}<text:line-break/> <text:s text:c="7"/>.login-title { <text:line-break/> <text:s text:c="11"/>text-align: center; <text:line-break/> <text:s text:c="11"/>color: #1a3a5c; <text:line-break/> <text:s text:c="11"/>font-weight: bold; <text:line-break/> <text:s text:c="11"/>margin-bottom: 1.5rem;<text:line-break/> <text:s text:c="11"/>font-size: 1.5rem;<text:line-break/> <text:s text:c="7"/>}<text:line-break/> <text:s text:c="7"/>.stButton&gt;button { <text:line-break/> <text:s text:c="11"/>background: #2e6da4; <text:line-break/> <text:s text:c="11"/>color: white; <text:line-break/> <text:s text:c="11"/>border: none; <text:line-break/> <text:s text:c="11"/>border-radius: 0.5rem;<text:line-break/> <text:s text:c="11"/>font-weight: bold;<text:line-break/> <text:s text:c="7"/>}<text:line-break/><text:soft-page-break/> <text:s text:c="7"/>.stButton&gt;button:hover { background: #1a3a5c; }<text:line-break/> <text:s text:c="7"/>.footer { <text:line-break/> <text:s text:c="11"/>text-align: center; <text:line-break/> <text:s text:c="11"/>color: rgba(255,255,255,0.7); <text:line-break/> <text:s text:c="11"/>margin-top: 2rem; <text:line-break/> <text:s text:c="11"/>font-size: 0.9rem;<text:line-break/> <text:s text:c="7"/>}<text:line-break/> <text:s text:c="3"/>&lt;/style&gt;<text:line-break/> <text:s text:c="3"/>""", unsafe_allow_html=True)<text:line-break/> <text:s text:c="3"/><text:line-break/> <text:s text:c="3"/>authenticator = load_authenticator()<text:line-break/> <text:s text:c="3"/><text:line-break/> <text:s text:c="3"/># Container centralizado para login<text:line-break/> <text:s text:c="3"/>col1, col2, col3 = st.columns([1, 2, 1])<text:line-break/> <text:s text:c="3"/>with col2:<text:line-break/> <text:s text:c="7"/>st.markdown('&lt;div class="login-box"&gt;', unsafe_allow_html=True)<text:line-break/> <text:s text:c="7"/>st.markdown('&lt;div class="login-title"&gt;🎣 Pesca Dashboard v3.1&lt;/div&gt;', unsafe_allow_html=True)<text:line-break/> <text:s text:c="7"/><text:line-break/> <text:s text:c="7"/>try:<text:line-break/> <text:s text:c="11"/>login_status = authenticator.login(fields={'Form name': 'Login', 'Username': 'Utilizador', 'Password': 'Password', 'Login': 'Entrar'})<text:line-break/> <text:s text:c="7"/>except Exception as e:<text:line-break/> <text:s text:c="11"/>st.error(f"Erro de autenticação: {e}")<text:line-break/> <text:s text:c="11"/>return None<text:line-break/> <text:s text:c="7"/><text:line-break/> <text:s text:c="7"/>st.markdown('&lt;/div&gt;', unsafe_allow_html=True)<text:line-break/> <text:s text:c="7"/><text:line-break/> <text:s text:c="7"/>if login_status:<text:line-break/> <text:s text:c="11"/>st.success(f"✅ Bem-vindo, {st.session_state['name']}!")<text:line-break/> <text:s text:c="11"/>return authenticator<text:line-break/> <text:s text:c="7"/>elif login_status is False:<text:line-break/> <text:s text:c="11"/>st.error("❌ Utilizador ou password incorretos")<text:line-break/> <text:s text:c="7"/>elif login_status is None:<text:line-break/> <text:s text:c="11"/>st.info("🔐 Introduza as suas credenciais para aceder")<text:line-break/> <text:s text:c="7"/><text:line-break/> <text:s text:c="7"/>st.markdown('&lt;div class="footer"&gt;Sistema de Previsão de Pesca • Rede Jazida&lt;br&gt;Barragem de Castelo de Bode&lt;/div&gt;', unsafe_allow_html=True)<text:line-break/> <text:s text:c="3"/><text:line-break/> <text:s text:c="3"/>return None<text:line-break/><text:line-break/>def logout_button(authenticator):<text:line-break/> <text:s text:c="3"/>"""Botão de logout estilizado na sidebar."""<text:line-break/> <text:s text:c="3"/>with st.sidebar:<text:line-break/> <text:s text:c="7"/>st.write(f"👤 {st.session_state['name']}")<text:line-break/> <text:s text:c="7"/>if st.button("🚪 Logout", use_container_width=True, type="primary"):<text:line-break/> <text:s text:c="11"/>authenticator.logout('Logout', 'unrendered')<text:line-break/> <text:s text:c="11"/>st.rerun()</text:p>
      <text:p text:style-name="P5"/>
      <text:h text:style-name="P6" text:outline-level="2">📊 4. <text:span text:style-name="T5">src/data_loader.py</text:span> (Leitura de Dados para Cloud)</text:h>
      <text:p text:style-name="P7">import pandas as pd<text:line-break/>import sqlite3<text:line-break/>import json<text:line-break/>import os<text:line-break/>from pathlib import Path<text:line-break/>import streamlit as st<text:line-break/><text:line-break/><text:soft-page-break/># Caminhos adaptáveis para Streamlit Cloud<text:line-break/>@st.cache_data(ttl=300) <text:s/># Cache de 5 minutos para performance<text:line-break/>def load_sqlite_data(db_name="previsao_pesca_ml_v3.db"):<text:line-break/> <text:s text:c="3"/>"""Carrega dados do SQLite com fallback para CSV se DB não existir na cloud."""<text:line-break/> <text:s text:c="3"/># Em Cloud: o ficheiro pode estar em /mount/data/ ou sync via Dropbox<text:line-break/> <text:s text:c="3"/>possible_paths = [<text:line-break/> <text:s text:c="7"/>Path(__file__).parent.parent / "data" / db_name,<text:line-break/> <text:s text:c="7"/>Path("/mount/data") / db_name, <text:s/># Streamlit Cloud mount point<text:line-break/> <text:s text:c="7"/>Path(os.getcwd()) / db_name,<text:line-break/> <text:s text:c="3"/>]<text:line-break/> <text:s text:c="3"/><text:line-break/> <text:s text:c="3"/>for db_path in possible_paths:<text:line-break/> <text:s text:c="7"/>if db_path.exists():<text:line-break/> <text:s text:c="11"/>try:<text:line-break/> <text:s text:c="15"/>conn = sqlite3.connect(str(db_path))<text:line-break/> <text:s text:c="15"/># Query unificada para dashboard<text:line-break/> <text:s text:c="15"/>df = pd.read_sql("""<text:line-break/> <text:s text:c="19"/>SELECT <text:line-break/> <text:s text:c="23"/>m.datetime, m.temp_ar, m.temp_agua, m.vento_kmh, m.pressao,<text:line-break/> <text:s text:c="23"/>m.chuva_24h, l.fase_lua, l.moon_illumination,<text:line-break/> <text:s text:c="23"/>c.sucesso_score, c.especie, c.quantidade, c.peso_total<text:line-break/> <text:s text:c="19"/>FROM meteo m<text:line-break/> <text:s text:c="19"/>JOIN lunar l ON m.datetime = l.datetime<text:line-break/> <text:s text:c="19"/>LEFT JOIN capturas c ON DATE(c.datetime) = DATE(m.datetime)<text:line-break/> <text:s text:c="19"/>ORDER BY m.datetime DESC<text:line-break/> <text:s text:c="19"/>LIMIT 1000<text:line-break/> <text:s text:c="15"/>""", conn)<text:line-break/> <text:s text:c="15"/>conn.close()<text:line-break/> <text:s text:c="15"/>return df<text:line-break/> <text:s text:c="11"/>except Exception as e:<text:line-break/> <text:s text:c="15"/>st.warning(f"⚠️ Erro ao ler SQLite: {e}. A usar fallback.")<text:line-break/> <text:s text:c="3"/><text:line-break/> <text:s text:c="3"/># Fallback: carregar de CSVs exportados (mais leve para cloud)<text:line-break/> <text:s text:c="3"/>return load_csv_fallback()<text:line-break/><text:line-break/>@st.cache_data(ttl=300)<text:line-break/>def load_csv_fallback():<text:line-break/> <text:s text:c="3"/>"""Fallback para dados em CSV (mais compatível com cloud)."""<text:line-break/> <text:s text:c="3"/>try:<text:line-break/> <text:s text:c="7"/># Em produção, estes CSVs seriam sync via GitHub Actions + Dropbox/Google Drive<text:line-break/> <text:s text:c="7"/>meteo = pd.read_csv("data/historico_meteo.csv") if Path("data/historico_meteo.csv").exists() else pd.DataFrame()<text:line-break/> <text:s text:c="7"/>capturas = pd.read_csv("data/Capturas.csv") if Path("data/Capturas.csv").exists() else pd.DataFrame()<text:line-break/> <text:s text:c="7"/>previsao = pd.read_json("data/previsao_amanha.json") if Path("data/previsao_amanha.json").exists() else None<text:line-break/> <text:s text:c="7"/><text:line-break/> <text:s text:c="7"/>if not meteo.empty:<text:line-break/> <text:s text:c="11"/>meteo['datetime'] = pd.to_datetime(meteo['datetime'])<text:line-break/> <text:s text:c="7"/>return meteo, capturas, previsao<text:line-break/> <text:s text:c="3"/>except Exception as e:<text:line-break/> <text:s text:c="7"/>st.error(f"❌ Erro no fallback CSV: {e}")<text:line-break/> <text:s text:c="7"/>return pd.DataFrame(), pd.DataFrame(), None<text:line-break/><text:line-break/>@st.cache_data(ttl=600)<text:line-break/>def load_ml_model(model_path="modelo_pesca_v3_robusto.pkl"):<text:line-break/> <text:s text:c="3"/>"""Carrega modelo ML com cache."""<text:line-break/> <text:s text:c="3"/>import pickle<text:line-break/> <text:s text:c="3"/>possible_paths = [<text:line-break/> <text:s text:c="7"/>Path(__file__).parent.parent / model_path,<text:line-break/> <text:s text:c="7"/>Path("/mount/data") / model_path,<text:line-break/><text:soft-page-break/> <text:s text:c="7"/>Path(os.getcwd()) / model_path,<text:line-break/> <text:s text:c="3"/>]<text:line-break/> <text:s text:c="3"/>for p in possible_paths:<text:line-break/> <text:s text:c="7"/>if p.exists():<text:line-break/> <text:s text:c="11"/>with open(p, 'rb') as f:<text:line-break/> <text:s text:c="15"/>return pickle.load(f)<text:line-break/> <text:s text:c="3"/>st.warning("⚠️ Modelo ML não encontrado. Previsões desativadas.")<text:line-break/> <text:s text:c="3"/>return None</text:p>
      <text:p text:style-name="P5"/>
      <text:h text:style-name="P6" text:outline-level="2">🎨 5. <text:span text:style-name="T5">streamlit_app.py</text:span> (Página Principal + Router)</text:h>
      <text:p text:style-name="P7">#!/usr/bin/env python3<text:line-break/># -*- coding: utf-8 -*-<text:line-break/>"""<text:line-break/>STREAMLIT DASHBOARD - PREVISÃO DE PESCA v3.1<text:line-break/>Deploy: Streamlit Community Cloud (gratuito)<text:line-break/>Auth: streamlit-authenticator<text:line-break/>"""<text:line-break/>import streamlit as st<text:line-break/>from src.auth import login_page, logout_button<text:line-break/>from src.data_loader import load_sqlite_data, load_ml_model<text:line-break/><text:line-break/># Configuração inicial da página<text:line-break/>st.set_page_config(<text:line-break/> <text:s text:c="3"/>page_title="🎣 Pesca Dashboard",<text:line-break/> <text:s text:c="3"/>page_icon="🎣",<text:line-break/> <text:s text:c="3"/>layout="wide",<text:line-break/> <text:s text:c="3"/>initial_sidebar_state="expanded"<text:line-break/>)<text:line-break/><text:line-break/>def main():<text:line-break/> <text:s text:c="3"/># 1. Autenticação<text:line-break/> <text:s text:c="3"/>authenticator = login_page()<text:line-break/> <text:s text:c="3"/>if not authenticator:<text:line-break/> <text:s text:c="7"/>return <text:s/># Aguarda login<text:line-break/> <text:s text:c="3"/><text:line-break/> <text:s text:c="3"/># 2. Botão de logout na sidebar<text:line-break/> <text:s text:c="3"/>logout_button(authenticator)<text:line-break/> <text:s text:c="3"/><text:line-break/> <text:s text:c="3"/># 3. Sidebar com navegação<text:line-break/> <text:s text:c="3"/>with st.sidebar:<text:line-break/> <text:s text:c="7"/>st.title("🧭 Navegação")<text:line-break/> <text:s text:c="7"/>page = st.radio(<text:line-break/> <text:s text:c="11"/>"Ir para:",<text:line-break/> <text:s text:c="11"/>["🏠 Início", "📈 Histórico", "🔮 Previsão", "⚙️ Configurações", "📥 Importar"],<text:line-break/> <text:s text:c="11"/>index=0,<text:line-break/> <text:s text:c="11"/>label_visibility="collapsed"<text:line-break/> <text:s text:c="7"/>)<text:line-break/> <text:s text:c="7"/>st.divider()<text:line-break/> <text:s text:c="7"/>st.info("💡 Dica: Os dados atualizam automaticamente a cada 5 minutos.")<text:line-break/> <text:s text:c="3"/><text:line-break/> <text:s text:c="3"/># 4. Router de páginas<text:line-break/> <text:s text:c="3"/>if page == "🏠 Início":<text:line-break/> <text:s text:c="7"/>show_home()<text:line-break/> <text:s text:c="3"/>elif page == "📈 Histórico":<text:line-break/> <text:s text:c="7"/>show_historico()<text:line-break/> <text:s text:c="3"/>elif page == "🔮 Previsão":<text:line-break/> <text:s text:c="7"/>show_previsao()<text:line-break/> <text:s text:c="3"/>elif page == "⚙️ Configurações":<text:line-break/><text:soft-page-break/> <text:s text:c="7"/>show_config()<text:line-break/> <text:s text:c="3"/>elif page == "📥 Importar":<text:line-break/> <text:s text:c="7"/>show_importar()<text:line-break/><text:line-break/>def show_home():<text:line-break/> <text:s text:c="3"/>"""Página inicial com resumo executivo."""<text:line-break/> <text:s text:c="3"/>st.title("🎣 Dashboard de Previsão de Pesca")<text:line-break/> <text:s text:c="3"/>st.subheader("Rede Jazida • Barragem de Castelo de Bode")<text:line-break/> <text:s text:c="3"/><text:line-break/> <text:s text:c="3"/># Carregar dados<text:line-break/> <text:s text:c="3"/>df, capturas, previsao = load_sqlite_data()<text:line-break/> <text:s text:c="3"/><text:line-break/> <text:s text:c="3"/>if df.empty:<text:line-break/> <text:s text:c="7"/>st.warning("⚠️ Nenhum dado disponível. Verifique a sincronização da base de dados.")<text:line-break/> <text:s text:c="7"/>return<text:line-break/> <text:s text:c="3"/><text:line-break/> <text:s text:c="3"/># KPIs em cards<text:line-break/> <text:s text:c="3"/>col1, col2, col3, col4 = st.columns(4)<text:line-break/> <text:s text:c="3"/>with col1:<text:line-break/> <text:s text:c="7"/>st.metric("📊 Sessões Registadas", len(capturas) if not capturas.empty else 0)<text:line-break/> <text:s text:c="3"/>with col2:<text:line-break/> <text:s text:c="7"/>total_kg = capturas['Total_Kg'].sum() if not capturas.empty and 'Total_Kg' in capturas.columns else 0<text:line-break/> <text:s text:c="7"/>st.metric("🐟 Peso Total", f"{total_kg:.1f} kg")<text:line-break/> <text:s text:c="3"/>with col3:<text:line-break/> <text:s text:c="7"/>score_atual = previsao['score_previsto'].iloc[0] if previsao is not None and not previsao.empty else None<text:line-break/> <text:s text:c="7"/>st.metric("🎯 Score ML (Amanhã)", f"{score_atual}/100" if score_atual is not None else "N/A")<text:line-break/> <text:s text:c="3"/>with col4:<text:line-break/> <text:s text:c="7"/>ultima = df['datetime'].max().strftime("%d/%m") if not df.empty else "N/A"<text:line-break/> <text:s text:c="7"/>st.metric("📅 Última Atualização", ultima)<text:line-break/> <text:s text:c="3"/><text:line-break/> <text:s text:c="3"/># Gráfico rápido: evolução de scores<text:line-break/> <text:s text:c="3"/>if not df.empty and 'sucesso_score' in df.columns:<text:line-break/> <text:s text:c="7"/>st.subheader("📈 Evolução do Score de Sucesso")<text:line-break/> <text:s text:c="7"/>df_plot = df.dropna(subset=['sucesso_score']).sort_values('datetime').tail(30)<text:line-break/> <text:s text:c="7"/>st.line_chart(df_plot.set_index('datetime')['sucesso_score'], use_container_width=True)<text:line-break/> <text:s text:c="3"/><text:line-break/> <text:s text:c="3"/># Tabela recente de capturas<text:line-break/> <text:s text:c="3"/>if not capturas.empty:<text:line-break/> <text:s text:c="7"/>st.subheader("🎣 Últimas Capturas")<text:line-break/> <text:s text:c="7"/>st.dataframe(<text:line-break/> <text:s text:c="11"/>capturas.sort_values('Timestamp', ascending=False).head(10),<text:line-break/> <text:s text:c="11"/>use_container_width=True,<text:line-break/> <text:s text:c="11"/>hide_index=True<text:line-break/> <text:s text:c="7"/>)<text:line-break/><text:line-break/>def show_historico():<text:line-break/> <text:s text:c="3"/>"""Página de histórico com gráficos interativos."""<text:line-break/> <text:s text:c="3"/>st.title("📈 Histórico de Capturas")<text:line-break/> <text:s text:c="3"/>df, capturas, _ = load_sqlite_data()<text:line-break/> <text:s text:c="3"/><text:line-break/> <text:s text:c="3"/>if capturas.empty:<text:line-break/> <text:s text:c="7"/>st.info("📭 Sem registos de capturas ainda.")<text:line-break/> <text:s text:c="7"/>return<text:line-break/> <text:s text:c="3"/><text:line-break/> <text:s text:c="3"/># Filtros<text:line-break/> <text:s text:c="3"/>col1, col2 = st.columns(2)<text:line-break/><text:soft-page-break/> <text:s text:c="3"/>with col1:<text:line-break/> <text:s text:c="7"/>especie_filter = st.multiselect(<text:line-break/> <text:s text:c="11"/>"Filtrar por espécie:",<text:line-break/> <text:s text:c="11"/>options=[c.replace('_Qtd','') for c in capturas.columns if '_Qtd' in c],<text:line-break/> <text:s text:c="11"/>default=None<text:line-break/> <text:s text:c="7"/>)<text:line-break/> <text:s text:c="3"/>with col2:<text:line-break/> <text:s text:c="7"/>date_range = st.date_input("Período:", value=(capturas['Timestamp'].min().date(), capturas['Timestamp'].max().date()))<text:line-break/> <text:s text:c="3"/><text:line-break/> <text:s text:c="3"/># Gráfico: capturas por espécie (Plotly)<text:line-break/> <text:s text:c="3"/>import plotly.express as px<text:line-break/> <text:s text:c="3"/>species_cols = [c for c in capturas.columns if '_Kg' in c and c != 'Total_Kg']<text:line-break/> <text:s text:c="3"/>if species_cols:<text:line-break/> <text:s text:c="7"/>df_melt = capturas.melt(<text:line-break/> <text:s text:c="11"/>id_vars=['Timestamp'], <text:line-break/> <text:s text:c="11"/>value_vars=species_cols,<text:line-break/> <text:s text:c="11"/>var_name='Especie', <text:line-break/> <text:s text:c="11"/>value_name='Peso_Kg'<text:line-break/> <text:s text:c="7"/>)<text:line-break/> <text:s text:c="7"/>df_melt['Especie'] = df_melt['Especie'].str.replace('_Kg', '')<text:line-break/> <text:s text:c="7"/><text:line-break/> <text:s text:c="7"/>fig = px.bar(<text:line-break/> <text:s text:c="11"/>df_melt.groupby(['Timestamp', 'Especie'])['Peso_Kg'].sum().reset_index(),<text:line-break/> <text:s text:c="11"/>x='Timestamp', y='Peso_Kg', color='Especie',<text:line-break/> <text:s text:c="11"/>title="🐟 Peso por Espécie ao Longo do Tempo",<text:line-break/> <text:s text:c="11"/>labels={'Peso_Kg': 'Peso (kg)', 'Timestamp': 'Data'}<text:line-break/> <text:s text:c="7"/>)<text:line-break/> <text:s text:c="7"/>st.plotly_chart(fig, use_container_width=True)<text:line-break/> <text:s text:c="3"/><text:line-break/> <text:s text:c="3"/># Tabela detalhada<text:line-break/> <text:s text:c="3"/>st.subheader("📋 Dados Detalhados")<text:line-break/> <text:s text:c="3"/>st.dataframe(capturas, use_container_width=True)<text:line-break/><text:line-break/>def show_previsao():<text:line-break/> <text:s text:c="3"/>"""Página de previsão ML."""<text:line-break/> <text:s text:c="3"/>st.title("🔮 Previsão para Amanhã")<text:line-break/> <text:s text:c="3"/><text:line-break/> <text:s text:c="3"/># Carregar previsão<text:line-break/> <text:s text:c="3"/>_, _, previsao = load_sqlite_data()<text:line-break/> <text:s text:c="3"/>model_data = load_ml_model()<text:line-break/> <text:s text:c="3"/><text:line-break/> <text:s text:c="3"/>if previsao is None or previsao.empty:<text:line-break/> <text:s text:c="7"/>st.warning("⚠️ Previsão não disponível. Execute `prever_amanha_v3_1.py` localmente.")<text:line-break/> <text:s text:c="7"/>return<text:line-break/> <text:s text:c="3"/><text:line-break/> <text:s text:c="3"/># Mostrar previsão formatada<text:line-break/> <text:s text:c="3"/>p = previsao.iloc[0] if not previsao.empty else None<text:line-break/> <text:s text:c="3"/>if p is not None:<text:line-break/> <text:s text:c="7"/>col1, col2 = st.columns(2)<text:line-break/> <text:s text:c="7"/>with col1:<text:line-break/> <text:s text:c="11"/>st.metric("📊 Score ML", f"{p.get('score_previsto', 0):.1f}/100")<text:line-break/> <text:s text:c="11"/>st.metric("🐟 Espécie Recomendada", p.get('especie_recomendada', 'N/A'))<text:line-break/> <text:s text:c="7"/>with col2:<text:line-break/> <text:s text:c="11"/>st.metric("⏰ Melhor Horário", p.get('melhor_horario', 'N/A'))<text:line-break/> <text:s text:c="11"/>st.metric("🌡️ Tw Prevista", f"{p.get('condicoes_chave', {}).get('Tw', 0):.1f}°C")<text:line-break/> <text:s text:c="7"/><text:line-break/> <text:s text:c="7"/># Condições detalhadas<text:line-break/><text:soft-page-break/> <text:s text:c="7"/>with st.expander("🔍 Ver Condições Detalhadas"):<text:line-break/> <text:s text:c="11"/>st.json(p.get('condicoes_chave', {}), expanded=False)<text:line-break/> <text:s text:c="3"/><text:line-break/> <text:s text:c="3"/># Gráfico: feature importance se modelo carregado<text:line-break/> <text:s text:c="3"/>if model_data and 'feature_names' in model_data:<text:line-break/> <text:s text:c="7"/>st.subheader("🧠 Fatores que Influenciam a Previsão")<text:line-break/> <text:s text:c="7"/># Nota: feature importance requer retreino com feature_names guardados<text:line-break/> <text:s text:c="7"/>st.info("💡 Feature importance disponível após retreino com `treinar_modelo_ml_v3_1.py`")<text:line-break/><text:line-break/>def show_config():<text:line-break/> <text:s text:c="3"/>"""Página de configurações (apenas admin)."""<text:line-break/> <text:s text:c="3"/>st.title("⚙️ Configurações")<text:line-break/> <text:s text:c="3"/><text:line-break/> <text:s text:c="3"/>if st.session_state.get('username') != 'admin':<text:line-break/> <text:s text:c="7"/>st.warning("🔐 Apenas administradores podem aceder a esta página.")<text:line-break/> <text:s text:c="7"/>return<text:line-break/> <text:s text:c="3"/><text:line-break/> <text:s text:c="3"/>st.subheader("👥 Gestão de Utilizadores")<text:line-break/> <text:s text:c="3"/>st.info("Para adicionar/remover utilizadores, edite `data/credentials.yml` no repositório GitHub.")<text:line-break/> <text:s text:c="3"/><text:line-break/> <text:s text:c="3"/>st.subheader("🔗 Sincronização de Dados")<text:line-break/> <text:s text:c="3"/>st.markdown("""<text:line-break/> <text:s text:c="3"/>**Opções para manter dados atualizados na cloud:**<text:line-break/> <text:s text:c="3"/><text:line-break/> <text:s text:c="3"/>1. **GitHub Actions + Dropbox** (recomendado):<text:line-break/> <text:s text:c="6"/>- Configure um workflow que faz push dos CSVs/SQLite para uma pasta Dropbox<text:line-break/> <text:s text:c="6"/>- O dashboard lê dessa pasta via `dropbox` API<text:line-break/> <text:s text:c="3"/><text:line-break/> <text:s text:c="3"/>2. **Google Sheets** (simples):<text:line-break/> <text:s text:c="6"/>- Exporte `Capturas.csv` para Google Sheets<text:line-break/> <text:s text:c="6"/>- Use `gspread` para ler diretamente no dashboard<text:line-break/> <text:s text:c="3"/><text:line-break/> <text:s text:c="3"/>3. **Streamlit Cloud Mount** (avançado):<text:line-break/> <text:s text:c="6"/>- Conecte uma conta Dropbox/Google Drive no Streamlit Cloud<text:line-break/> <text:s text:c="6"/>- Monte em `/mount/data/` e aponte os paths no `data_loader.py`<text:line-break/> <text:s text:c="3"/>""")<text:line-break/> <text:s text:c="3"/><text:line-break/> <text:s text:c="3"/>st.subheader("🔄 Forçar Atualização")<text:line-break/> <text:s text:c="3"/>if st.button("🔄 Recarregar Dados Agora"):<text:line-break/> <text:s text:c="7"/>st.cache_data.clear()<text:line-break/> <text:s text:c="7"/>st.success("✅ Cache limpo. Dados recarregados na próxima interação.")<text:line-break/><text:line-break/>def show_importar():<text:line-break/> <text:s text:c="3"/>"""Página para upload manual de Capturas.csv."""<text:line-break/> <text:s text:c="3"/>st.title("📥 Importar Dados de Capturas")<text:line-break/> <text:s text:c="3"/><text:line-break/> <text:s text:c="3"/>uploaded = st.file_uploader("Selecionar Capturas.csv", type=['csv'])<text:line-break/> <text:s text:c="3"/>if uploaded:<text:line-break/> <text:s text:c="7"/>try:<text:line-break/> <text:s text:c="11"/>df_new = pd.read_csv(uploaded, parse_dates=['Timestamp'])<text:line-break/> <text:s text:c="11"/>st.success(f"✅ Ficheiro lido: {len(df_new)} registos")<text:line-break/> <text:s text:c="11"/>st.dataframe(df_new.head(), use_container_width=True)<text:line-break/> <text:s text:c="11"/><text:line-break/> <text:s text:c="11"/>if st.button("💾 Guardar no Sistema"):<text:line-break/> <text:s text:c="15"/># Em cloud: guardar em Google Sheets ou trigger para sync<text:line-break/> <text:s text:c="15"/>st.info("💡 Em produção, isto dispararia um sync para a base de dados principal.")<text:line-break/> <text:s text:c="15"/>st.success("✅ Dados processados (simulação)")<text:line-break/> <text:s text:c="7"/>except Exception as e:<text:line-break/> <text:s text:c="11"/>st.error(f"❌ Erro ao processar: {e}")<text:line-break/><text:line-break/><text:soft-page-break/>if __name__ == "__main__":<text:line-break/> <text:s text:c="3"/>main()</text:p>
      <text:p text:style-name="P5"/>
      <text:h text:style-name="P6" text:outline-level="2">⚙️ 6. <text:span text:style-name="T5">.streamlit/config.toml</text:span></text:h>
      <text:p text:style-name="P7">[theme]<text:line-break/>primaryColor = "#2E6DA4"<text:line-break/>backgroundColor = "#F8F9FA"<text:line-break/>secondaryBackgroundColor = "#FFFFFF"<text:line-break/>textColor = "#1A3A5C"<text:line-break/>font = "sans serif"<text:line-break/><text:line-break/>[server]<text:line-break/>enableCORS = false<text:line-break/>enableXsrfProtection = true<text:line-break/><text:line-break/>[browser]<text:line-break/>gatherUsageStats = false</text:p>
      <text:p text:style-name="P5"/>
      <text:h text:style-name="P6" text:outline-level="2">🚀 7. Como Deploy no Streamlit Community Cloud (Gratuito)</text:h>
      <text:h text:style-name="P9" text:outline-level="3">Passo 1: Preparar Repositório GitHub</text:h>
      <text:p text:style-name="P7"># No seu computador:<text:line-break/>cd D:\_WORK_\work_python_and_R\___WORK5___\Weather5<text:line-break/>git init<text:line-break/>git remote add origin https://github.com/mpmendespt/pesca-dashboard.git<text:line-break/># Copie os ficheiros acima para a estrutura indicada<text:line-break/>git add .<text:line-break/>git commit -m "Initial commit: Streamlit dashboard v3.1"<text:line-break/>git push -u origin main</text:p>
      <text:p text:style-name="P7">….</text:p>
      <text:p text:style-name="P10">Excelente! ✅ Autenticação concluída com sucesso. Você está logado como <text:span text:style-name="Strong_20_Emphasis">mpmendespt</text:span>.</text:p>
      <text:p text:style-name="P11">Agora vamos criar o repositório remoto diretamente da sua pasta local.</text:p>
      <text:h text:style-name="P12" text:outline-level="2">🚀 Comando final (execute dentro da pasta <text:span text:style-name="Source_20_Text">Previsao_Pesca</text:span>)</text:h>
      <text:p text:style-name="P13">bash</text:p>
      <text:p text:style-name="P14">gh repo create pesca-dashboard --public --source=. --remote=origin --push</text:p>
      <text:h text:style-name="P15" text:outline-level="3">O que este comando faz:</text:h>
      <text:list text:style-name="L1">
        <text:list-item>
          <text:p text:style-name="P16">Cria um repositório público chamado <text:span text:style-name="Source_20_Text">pesca-dashboard</text:span> no GitHub (sob sua conta <text:span text:style-name="Source_20_Text">mpmendespt</text:span>)</text:p>
        </text:list-item>
        <text:list-item>
          <text:p text:style-name="P16">Usa a pasta atual (<text:span text:style-name="Source_20_Text">--source=.</text:span>) como conteúdo</text:p>
        </text:list-item>
        <text:list-item>
          <text:p text:style-name="P16"><text:soft-page-break/>Adiciona o remote <text:span text:style-name="Source_20_Text">origin</text:span> automaticamente</text:p>
        </text:list-item>
        <text:list-item>
          <text:p text:style-name="P16">Faz o <text:span text:style-name="Source_20_Text">git push</text:span> do seu código para o GitHub</text:p>
        </text:list-item>
      </text:list>
      <text:p text:style-name="Text_20_body">(Pesquisas) D:_WORK_\work_python_and_R_<text:span text:style-name="T6">WORK</text:span>_\Previsao_Pesca&gt;gh repo create pesca-dashboard --public --source=. --remote=origin --push ✓ Created repository mpmendespt/pesca-dashboard on github.com <text:a xlink:type="simple" xlink:href="https://github.com/mpmendespt/pesca-dashboard" text:style-name="Internet_20_link" text:visited-style-name="Visited_20_Internet_20_Link">https://github.com/mpmendespt/pesca-dashboard</text:a> X Unable to add remote "origin"</text:p>
      <text:p text:style-name="Text_20_body"/>
      <text:h text:style-name="P15" text:outline-level="3">Após executar, você verá algo como:</text:h>
      <text:p text:style-name="P13">text</text:p>
      <text:p text:style-name="P17">✓ Created repository mpmendespt/pesca-dashboard on GitHub</text:p>
      <text:p text:style-name="P17">✓ Added remote origin</text:p>
      <text:p text:style-name="P17">✓ Pushed commits to origin/main</text:p>
      <text:h text:style-name="P15" text:outline-level="3">🔍 Verificação (opcional):</text:h>
      <text:p text:style-name="P13">bash</text:p>
      <text:p text:style-name="P17">git remote -v</text:p>
      <text:p text:style-name="P11">Deve mostrar a URL do repositório recém-criado.</text:p>
      <text:h text:style-name="P15" text:outline-level="3">Próximos passos no dia a dia:</text:h>
      <text:p text:style-name="P11">Agora você pode trabalhar normalmente com:</text:p>
      <text:p text:style-name="P13">bash</text:p>
      <text:p text:style-name="P17">git add .</text:p>
      <text:p text:style-name="P17">git commit -m "mensagem"</text:p>
      <text:p text:style-name="P17">git push</text:p>
      <text:p text:style-name="P11">Sem nunca mais digitar senha ou token.</text:p>
      <text:p text:style-name="P11">Se o comando <text:span text:style-name="Source_20_Text">gh repo create</text:span> der erro (por exemplo, "repository already exists"), me avise que resolvemos rapidamente. Caso contrário, seu repositório já está no ar! 🎉</text:p>
      <text:p text:style-name="P7">………...</text:p>
      <text:h text:style-name="P9" text:outline-level="3">Passo 2: Configurar no Streamlit Cloud</text:h>
      <text:list text:style-name="L2">
        <text:list-item>
          <text:p text:style-name="P18">Aceda a <text:a xlink:type="simple" xlink:href="https://share.streamlit.io/" text:style-name="Internet_20_link" text:visited-style-name="Visited_20_Internet_20_Link">share.streamlit.io</text:a></text:p>
        </text:list-item>
        <text:list-item>
          <text:p text:style-name="P18">Clique em <text:span text:style-name="T6">"New app"</text:span></text:p>
        </text:list-item>
        <text:list-item>
          <text:p text:style-name="P18">Conecte o seu repositório GitHub: <text:span text:style-name="T5">mpmendespt/pesca-dashboard</text:span></text:p>
        </text:list-item>
        <text:list-item>
          <text:p text:style-name="P19"><text:soft-page-break/>Defina:</text:p>
          <text:list>
            <text:list-item>
              <text:p text:style-name="P18"><text:span text:style-name="T6">Branch:</text:span> <text:span text:style-name="T5">main</text:span></text:p>
            </text:list-item>
            <text:list-item>
              <text:p text:style-name="P18"><text:span text:style-name="T6">Main file path:</text:span> <text:span text:style-name="T5">streamlit_app.py</text:span></text:p>
            </text:list-item>
            <text:list-item>
              <text:p text:style-name="P18"><text:span text:style-name="T6">Python version:</text:span> <text:span text:style-name="T5">3.10</text:span> (ou superior)</text:p>
            </text:list-item>
          </text:list>
        </text:list-item>
        <text:list-item>
          <text:p text:style-name="P18">Clique em <text:span text:style-name="T6">"Advanced settings"</text:span> → <text:span text:style-name="T6">"Secrets"</text:span> e adicione:</text:p>
          <text:p text:style-name="P20"># Exemplo para integração futura com APIs externas<text:line-break/>DROPBOX_TOKEN = "seu_token_aqui"<text:line-break/>GOOGLE_SHEETS_CREDENTIALS = "{\"type\": \"service_account\", ...}"</text:p>
        </text:list-item>
        <text:list-item>
          <text:p text:style-name="P18">Clique em <text:span text:style-name="T6">"Deploy!"</text:span> 🎉</text:p>
        </text:list-item>
      </text:list>
      <text:h text:style-name="P9" text:outline-level="3">Passo 3: Sincronizar Dados (Crítico)</text:h>
      <text:p text:style-name="P21">Como o Streamlit Cloud é <text:span text:style-name="T7">stateless</text:span>, os dados devem vir de uma fonte externa:</text:p>
      <text:h text:style-name="P22" text:outline-level="4">Opção A: GitHub + GitHub Actions (Simples)</text:h>
      <text:list text:style-name="L3">
        <text:list-item>
          <text:p text:style-name="P23">Exporte <text:span text:style-name="T5">Capturas.csv</text:span> e <text:span text:style-name="T5">previsao_amanha.json</text:span> para a pasta <text:span text:style-name="T5">data/</text:span> do repositório</text:p>
        </text:list-item>
        <text:list-item>
          <text:p text:style-name="P23">Configure um GitHub Action que faz <text:span text:style-name="T5">git push</text:span> diário após a automação local correr</text:p>
        </text:list-item>
      </text:list>
      <text:h text:style-name="P22" text:outline-level="4">Opção B: Dropbox Sync (Recomendado)</text:h>
      <text:list text:style-name="L4">
        <text:list-item>
          <text:p text:style-name="P24">No Streamlit Cloud: <text:span text:style-name="T6">Settings</text:span> → <text:span text:style-name="T6">Data connections</text:span> → Conecte Dropbox</text:p>
        </text:list-item>
        <text:list-item>
          <text:p text:style-name="P24">No <text:span text:style-name="T5">data_loader.py</text:span>, use:</text:p>
          <text:p text:style-name="P25">import dropbox<text:line-break/>dbx = dropbox.Dropbox(st.secrets["DROPBOX_TOKEN"])<text:line-break/>_, res = dbx.files_download(path="/pesca/previsao_pesca_ml_v3.db")<text:line-break/>with open("/tmp/db.sqlite", "wb") as f:<text:line-break/> <text:s text:c="3"/>f.write(res.content)<text:line-break/># Agora ler de /tmp/db.sqlite</text:p>
        </text:list-item>
      </text:list>
      <text:h text:style-name="P22" text:outline-level="4">Opção C: Google Sheets (Mais Simples para Início)</text:h>
      <text:list text:style-name="L5">
        <text:list-item>
          <text:p text:style-name="P26">Publique <text:span text:style-name="T5">Capturas.csv</text:span> como Google Sheet público</text:p>
        </text:list-item>
        <text:list-item>
          <text:p text:style-name="P26">No <text:span text:style-name="T5">data_loader.py</text:span>:</text:p>
          <text:p text:style-name="P27">import gspread<text:line-break/>gc = gspread.service_account_from_dict(json.loads(st.secrets["GOOGLE_SHEETS_CREDENTIALS"]))<text:line-break/>sheet = gc.open("Pesquisas_Capturas").sheet1<text:line-break/>df = pd.DataFrame(sheet.get_all_records())</text:p>
        </text:list-item>
      </text:list>
      <text:p text:style-name="P5"/>
      <text:h text:style-name="P6" text:outline-level="2">🔗 8. Integração Futura com GitHub Pages (Sua Página Atual)</text:h>
      <text:p text:style-name="P21">Como já tem <text:span text:style-name="T5">https://mpmendespt.github.io/Pesquisas/app/login.html</text:span>, pode:</text:p>
      <text:h text:style-name="P9" text:outline-level="3"><text:soft-page-break/>Opção 1: Redirecionamento Simples</text:h>
      <text:p text:style-name="P21">No seu <text:span text:style-name="T5">login.html</text:span>, adicione:</text:p>
      <text:p text:style-name="P7">&lt;!-- Após login bem-sucedido no seu sistema atual --&gt;<text:line-break/>&lt;script&gt;<text:line-break/> <text:s/>// Redireciona para o dashboard Streamlit<text:line-break/> <text:s/>window.location.href = "https://pesca-dashboard-xyz.streamlit.app";<text:line-break/>&lt;/script&gt;</text:p>
      <text:h text:style-name="P9" text:outline-level="3">Opção 2: iframe Embed (Avançado)</text:h>
      <text:p text:style-name="P21">No seu site GitHub Pages:</text:p>
      <text:p text:style-name="P7">&lt;iframe <text:line-break/> <text:s/>src="https://pesca-dashboard-xyz.streamlit.app" <text:line-break/> <text:s/>width="100%" <text:line-break/> <text:s/>height="800px" <text:line-break/> <text:s/>frameborder="0"<text:line-break/> <text:s/>style="border-radius: 12px; box-shadow: 0 4px 20px rgba(0,0,0,0.1);"&gt;<text:line-break/>&lt;/iframe&gt;</text:p>
      <text:h text:style-name="P9" text:outline-level="3">Opção 3: SSO com GitHub OAuth (Profissional)</text:h>
      <text:list text:style-name="L6">
        <text:list-item>
          <text:p text:style-name="P28">No Streamlit Cloud: use <text:span text:style-name="T5">streamlit-github-login</text:span> para autenticação via GitHub</text:p>
        </text:list-item>
        <text:list-item>
          <text:p text:style-name="P28">No seu <text:span text:style-name="T5">login.html</text:span>: após login, passe o token via URL params para o iframe</text:p>
        </text:list-item>
        <text:list-item>
          <text:p text:style-name="P28">No dashboard: valide o token e carregue o perfil do utilizador</text:p>
        </text:list-item>
      </text:list>
      <text:p text:style-name="P5"/>
      <text:h text:style-name="P6" text:outline-level="2">📋 Checklist de Validação Antes do Deploy</text:h>
      <text:list text:style-name="L7">
        <text:list-item>
          <text:p text:style-name="P29"><loext:content-control loext:checkbox="true" loext:checked-state="☒" loext:unchecked-state="☐" loext:id="527870221">☐</loext:content-control> <text:span text:style-name="T5">requirements.txt</text:span> inclui todas as dependências</text:p>
        </text:list-item>
        <text:list-item>
          <text:p text:style-name="P29"><loext:content-control loext:checkbox="true" loext:checked-state="☒" loext:unchecked-state="☐" loext:id="1964500166">☐</loext:content-control> <text:span text:style-name="T5">credentials.yml</text:span> tem hashes bcrypt (não passwords em claro)</text:p>
        </text:list-item>
        <text:list-item>
          <text:p text:style-name="P29"><loext:content-control loext:checkbox="true" loext:checked-state="☒" loext:unchecked-state="☐" loext:id="1443104597">☐</loext:content-control> <text:span text:style-name="T5">streamlit_app.py</text:span> roda localmente: <text:span text:style-name="T5">streamlit run streamlit_app.py</text:span></text:p>
        </text:list-item>
        <text:list-item>
          <text:p text:style-name="P29"><loext:content-control loext:checkbox="true" loext:checked-state="☒" loext:unchecked-state="☐" loext:id="632360823">☐</loext:content-control> Caminhos de dados são relativos ou usam <text:span text:style-name="T5">st.secrets</text:span> para tokens</text:p>
        </text:list-item>
        <text:list-item>
          <text:p text:style-name="P29"><loext:content-control loext:checkbox="true" loext:checked-state="☒" loext:unchecked-state="☐" loext:id="621111304">☐</loext:content-control> <text:span text:style-name="T5">.gitignore</text:span> exclui <text:span text:style-name="T5">.sqlite</text:span>, <text:span text:style-name="T5">.pkl</text:span>, <text:span text:style-name="T5">.log</text:span>, <text:span text:style-name="T5">__pycache__/</text:span></text:p>
        </text:list-item>
        <text:list-item>
          <text:p text:style-name="P29"><loext:content-control loext:checkbox="true" loext:checked-state="☒" loext:unchecked-state="☐" loext:id="358164975">☐</loext:content-control> README.md tem instruções claras para contribuidores</text:p>
        </text:list-item>
      </text:list>
      <text:p text:style-name="P5"/>
      <text:h text:style-name="P6" text:outline-level="2">💡 Próximos Passos Sugeridos</text:h>
      <text:list text:style-name="L8">
        <text:list-item>
          <text:p text:style-name="P30"><text:span text:style-name="T6">Teste local primeiro</text:span>: <text:span text:style-name="T5">streamlit run streamlit_app.py</text:span></text:p>
        </text:list-item>
        <text:list-item>
          <text:p text:style-name="P30"><text:span text:style-name="T6">Deploy mínimo</text:span>: Suba apenas <text:span text:style-name="T5">streamlit_app.py</text:span> + <text:span text:style-name="T5">requirements.txt</text:span> + <text:span text:style-name="T5">credentials.yml</text:span> para validar a autenticação</text:p>
        </text:list-item>
        <text:list-item>
          <text:p text:style-name="P30"><text:span text:style-name="T6">Adicione dados gradualmente</text:span>: Comece com CSVs estáticos, depois integre sync automático</text:p>
        </text:list-item>
        <text:list-item>
          <text:p text:style-name="P30"><text:soft-page-break/><text:span text:style-name="T6">Personalize o visual</text:span>: Use <text:span text:style-name="T5">assets/styles.css</text:span> para alinhar com a identidade da sua página GitHub Pages</text:p>
        </text:list-item>
      </text:list>
      <text:p text:style-name="P21">Precisa que eu gere os ficheiros restantes (<text:span text:style-name="T5">plots.py</text:span>, <text:span text:style-name="T5">ml_utils.py</text:span>, <text:span text:style-name="T5">.gitignore</text:span>, <text:span text:style-name="T5">README.md</text:span>) ou ajude a configurar o GitHub Actions para sync automático de dados? 🎣☁️</text:p>
      <text:p text:style-name="P21">…………………..</text:p>
      <text:p text:style-name="P31">Alterar de: <text:s/>D:\_WORK_\work_python_and_R\___WORK5___\Weather5</text:p>
      <text:p text:style-name="P21">para: <text:s/></text:p>
      <text:p text:style-name="P21">D:_WORK_\work_python_and_R_<text:span text:style-name="T6">WORK</text:span>_\Previsao_Pesca</text:p>
      <text:p text:style-name="P31">e criar um script que faça a copia de todos os files que sejam necessários ao projecto, da diretoria anterior para a atual.</text:p>
      <text:p text:style-name="P21"/>
      <text:p text:style-name="P21">…………………..…………………..</text:p>
      <text:p text:style-name="P21">(base) D:_WORK_\work_python_and_R_<text:span text:style-name="T6">WORK5</text:span>_\Weather5&gt;python migrar_projeto_pesca.py D:_WORK_\work_python_and_R_<text:span text:style-name="T6">WORK5</text:span>_\Weather5\migrar_projeto_pesca.py:6: SyntaxWarning: invalid escape sequence '_' ORIGEM: D:_WORK_\work_python_and_R_<text:span text:style-name="T6">WORK5</text:span>_\Weather5 📦 Iniciando migração do projeto Previsão de Pesca v3.1... 📍 Origem: D:_WORK_\work_python_and_R_<text:span text:style-name="T6">WORK5</text:span>_\Weather5 📍 Destino: D:_WORK_\work_python_and_R\WORK_\Previsao_Pesca ✅ Diretório criado: D:_WORK_\work_python_and_R\WORK_\Previsao_Pesca</text:p>
      <text:p text:style-name="P21">✅ Migração concluída! 📁 Destino: D:_WORK_\work_python_and_R\WORK_\Previsao_Pesca 📝 Log detalhado: migracao_log_20260528_192627.txt 📊 Resumo: 21 ficheiros | 0 pastas 🔍 Verificando configurações de paths... ✅ Paths já estão compatíveis com novo diretório. </text:p>
      <text:p text:style-name="P21">NOTA: O Destino deve ser: D:_WORK_\work_python_and_R_<text:span text:style-name="T6">WORK</text:span>_\Previsao_Pesca </text:p>
      <text:p text:style-name="P21">NOTA2: Por agora deve-se manter em funcionamento os script que estão em funcinamento na directoria origem. </text:p>
      <text:p text:style-name="P21">NOTA3: O objectivo é que quando o novo desenvolvimento esteja concluido então passe tudo a funcionar na directoria Destino. Por isso peço tambem as instruções a serem usadas futuramente para alteração dos path dos bat files. </text:p>
      <text:p text:style-name="P21">Nota4: Resolver tambem: syntaxWarning: invalid escape sequence '_'</text:p>
      <text:p text:style-name="P31">…..</text:p>
      <text:p text:style-name="P21">Aqui está a versão corrigida e otimizada do script, pronta a executar. Inclui o <text:span text:style-name="T6">fix para o </text:span><text:span text:style-name="T8">SyntaxWarning</text:span>, o <text:span text:style-name="T6">caminho de destino atualizado</text:span> (<text:span text:style-name="T5">___WORK___</text:span>), e as <text:span text:style-name="T6">instruções exatas para a transição futura</text:span> sem interromper o sistema atual.</text:p>
      <text:p text:style-name="P5"/>
      <text:h text:style-name="P9" text:outline-level="3"><text:soft-page-break/>📦 <text:span text:style-name="T9">migrar_projeto_pesca_v3_2.py</text:span> (Corrigido &amp; Pronto)</text:h>
      <text:p text:style-name="P7">#!/usr/bin/env python3<text:line-break/># -*- coding: utf-8 -*-<text:line-break/>"""<text:line-break/>MIGRAÇÃO DE PROJETO - PREVISÃO DE PESCA v3.2<text:line-break/>- Corrige SyntaxWarning (substitui \ por /)<text:line-break/>- Ajusta destino para D:/_WORK_/work_python_and_R/___WORK___/Previsao_Pesca<text:line-break/>- Mantém origem intacta (copia, não move)<text:line-break/>"""<text:line-break/>import os<text:line-break/>import shutil<text:line-break/>from pathlib import Path<text:line-break/>from datetime import datetime<text:line-break/><text:line-break/># 🔧 Usa barras normais para evitar SyntaxWarning e garantir compatibilidade<text:line-break/>SRC_DIR = Path("D:/_WORK_/work_python_and_R/___WORK5___/Weather5")<text:line-break/>DST_DIR = Path("D:/_WORK_/work_python_and_R/___WORK___/Previsao_Pesca")<text:line-break/><text:line-break/>FILES_ESSENCIAIS = [<text:line-break/> <text:s text:c="3"/>"config_v3_1.json", "config_loader.py",<text:line-break/> <text:s text:c="3"/>"previsao_pesca_v3_1.py", "treinar_modelo_ml_v3_1.py",<text:line-break/> <text:s text:c="3"/>"prever_amanha_v3_1.py", "notificar_telegram.py",<text:line-break/> <text:s text:c="3"/>"pipeline_orquestrador_v3_1.py", "run_pesca_v3_1_automated.bat",<text:line-break/> <text:s text:c="3"/>"previsao_pesca_v2_10.py", "previsao_pesca_v2.8.bat",<text:line-break/> <text:s text:c="3"/>"previsao_pesca_ml_v3.db", "modelo_pesca_v3_robusto.pkl",<text:line-break/> <text:s text:c="3"/>"previsao_amanha.json", "Capturas.csv",<text:line-break/> <text:s text:c="3"/>"historico_temperaturas_castelo_bode.csv", "automacao_v3.1.log",<text:line-break/> <text:s text:c="3"/>"backup_arquitetura_v3_1.py", "migrar_projeto_pesca.py"<text:line-break/>]<text:line-break/><text:line-break/>def copiar_ficheiro(src: Path, dst: Path, log) -&gt; bool:<text:line-break/> <text:s text:c="3"/>try:<text:line-break/> <text:s text:c="7"/>if not src.exists():<text:line-break/> <text:s text:c="11"/>log.write(f"[⏭️] Ignorado (não existe): {src.name}\n")<text:line-break/> <text:s text:c="11"/>return False<text:line-break/> <text:s text:c="7"/>dst.parent.mkdir(parents=True, exist_ok=True)<text:line-break/> <text:s text:c="7"/>shutil.copy2(src, dst)<text:line-break/> <text:s text:c="7"/>log.write(f"[✅] Copiado: {src.name}\n")<text:line-break/> <text:s text:c="7"/>return True<text:line-break/> <text:s text:c="3"/>except Exception as e:<text:line-break/> <text:s text:c="7"/>log.write(f"[❌] Erro em {src.name}: {e}\n")<text:line-break/> <text:s text:c="7"/>return False<text:line-break/><text:line-break/>def migrar():<text:line-break/> <text:s text:c="3"/>print("📦 Iniciando migração v3.2...")<text:line-break/> <text:s text:c="3"/>print(f"📍 Origem: {SRC_DIR}")<text:line-break/> <text:s text:c="3"/>print(f"📍 Destino: {DST_DIR}")<text:line-break/> <text:s text:c="3"/><text:line-break/> <text:s text:c="3"/>if not SRC_DIR.exists():<text:line-break/> <text:s text:c="7"/>print("❌ Origem não encontrada. Verifique o caminho."); return<text:line-break/> <text:s text:c="7"/><text:line-break/> <text:s text:c="3"/>DST_DIR.mkdir(parents=True, exist_ok=True)<text:line-break/> <text:s text:c="3"/>print(f"✅ Diretório destino pronto: {DST_DIR}")<text:line-break/> <text:s text:c="3"/><text:line-break/> <text:s text:c="3"/>log_path = DST_DIR / f"migracao_log_{datetime.now().strftime('%Y%m%d_%H%M%S')}.txt"<text:line-break/> <text:s text:c="3"/>with open(log_path, "w", encoding="utf-8") as log:<text:line-break/> <text:s text:c="7"/>log.write(f"Migração: {SRC_DIR} -&gt; {DST_DIR}\n")<text:line-break/> <text:s text:c="7"/>log.write(f"Início: {datetime.now().strftime('%Y-%m-%d %H:%M:%S')}\n\n")<text:line-break/> <text:s text:c="7"/><text:line-break/> <text:s text:c="7"/>copied = sum(1 for f in FILES_ESSENCIAIS if copiar_ficheiro(SRC_DIR / f, DST_DIR / f, log))<text:line-break/> <text:s text:c="7"/><text:line-break/><text:soft-page-break/> <text:s text:c="7"/>log.write(f"\n📊 Resumo: {copied}/{len(FILES_ESSENCIAIS)} ficheiros copiados.\n")<text:line-break/> <text:s text:c="7"/><text:line-break/> <text:s text:c="3"/>print(f"✅ Migração concluída! {copied} ficheiros copiados.")<text:line-break/> <text:s text:c="3"/>print(f"📁 Pasta: {DST_DIR}")<text:line-break/> <text:s text:c="3"/>print(f"📝 Log: {log_path.name}")<text:line-break/> <text:s text:c="3"/>print("💡 A origem (Weather5) permanece intacta e funcional.")<text:line-break/><text:line-break/>if __name__ == "__main__":<text:line-break/> <text:s text:c="3"/>migrar()</text:p>
      <text:p text:style-name="P5"/>
      <text:h text:style-name="P9" text:outline-level="3">🔍 Porquê o <text:span text:style-name="T5">SyntaxWarning</text:span> desapareceu?</text:h>
      <text:p text:style-name="P21">Python 3.12+ alerta quando strings ou docstrings contêm <text:span text:style-name="T5">\</text:span> seguido de caracteres que não formam escapes válidos (ex: <text:span text:style-name="T5">\W</text:span>, <text:span text:style-name="T5">\_</text:span>). Substituir por <text:span text:style-name="T6">barras normais </text:span><text:span text:style-name="T8">/</text:span> ou usar <text:span text:style-name="T6">raw strings </text:span><text:span text:style-name="T8">r"..."</text:span> elimina o aviso completamente e mantém o código multiplataforma.</text:p>
      <text:p text:style-name="P5"/>
      <text:h text:style-name="P9" text:outline-level="3">🔄 Estratégia de Funcionamento Duplo (Origem vs Destino)</text:h>
      <table:table table:name="Table10" table:style-name="Table10">
        <table:table-column table:style-name="Table10.A" table:number-columns-repeated="2"/>
        <table:table-header-rows>
          <table:table-row>
            <table:table-cell table:style-name="Table10.A1" office:value-type="string">
              <text:p text:style-name="P32">Fase</text:p>
            </table:table-cell>
            <table:table-cell table:style-name="Table10.B1" office:value-type="string">
              <text:p text:style-name="P32">O que acontece</text:p>
            </table:table-cell>
          </table:table-row>
        </table:table-header-rows>
        <table:table-row>
          <table:table-cell table:style-name="Table10.A2" office:value-type="string">
            <text:p text:style-name="P33"><text:span text:style-name="T6">Agora</text:span></text:p>
          </table:table-cell>
          <table:table-cell table:style-name="Table10.B2" office:value-type="string">
            <text:p text:style-name="P33">O script faz <text:span text:style-name="T5">copy2</text:span> (não <text:span text:style-name="T5">move</text:span>). A pasta <text:span text:style-name="T5">Weather5</text:span> continua a correr a automação diária sem interrupção.</text:p>
          </table:table-cell>
        </table:table-row>
        <table:table-row>
          <table:table-cell table:style-name="Table10.A2" office:value-type="string">
            <text:p text:style-name="P33"><text:span text:style-name="T6">Durante desenvolvimento</text:span></text:p>
          </table:table-cell>
          <table:table-cell table:style-name="Table10.B2" office:value-type="string">
            <text:p text:style-name="P33">Trabalhe apenas na pasta <text:span text:style-name="T5">___WORK___\Previsao_Pesca</text:span>. Teste scripts, modelos e configs lá.</text:p>
          </table:table-cell>
        </table:table-row>
        <table:table-row>
          <table:table-cell table:style-name="Table10.A2" office:value-type="string">
            <text:p text:style-name="P33"><text:span text:style-name="T6">Futuro (switch)</text:span></text:p>
          </table:table-cell>
          <table:table-cell table:style-name="Table10.B2" office:value-type="string">
            <text:p text:style-name="P33">Quando o novo sistema estiver estável, atualize <text:span text:style-name="T6">apenas os caminhos nos </text:span><text:span text:style-name="T8">.bat</text:span><text:span text:style-name="T6"> e Task Scheduler</text:span>. A origem pode ser arquivada.</text:p>
          </table:table-cell>
        </table:table-row>
      </table:table>
      <text:p text:style-name="P21"/>
      <text:p text:style-name="P5"/>
      <text:h text:style-name="P9" text:outline-level="3">📋 Instruções para Transição Futura (Quando estiver pronto)</text:h>
      <text:h text:style-name="P22" text:outline-level="4">1️⃣ Atualizar os <text:span text:style-name="T5">.bat</text:span> na pasta nova</text:h>
      <text:p text:style-name="P21">Abra <text:span text:style-name="T5">run_pesca_v3_1_automated.bat</text:span> e <text:span text:style-name="T5">previsao_pesca_v2.8.bat</text:span> na pasta <text:span text:style-name="T5">Previsao_Pesca</text:span> e altere <text:span text:style-name="T6">apenas esta linha</text:span>:</text:p>
      <text:p text:style-name="P7">:: ANTES:<text:line-break/>set "SCRIPT_DIR=D:\_WORK_\work_python_and_R\___WORK5___\Weather5"<text:line-break/>:: DEPOIS:<text:line-break/>set "SCRIPT_DIR=D:\_WORK_\work_python_and_R\___WORK___\Previsao_Pesca"</text:p>
      <text:h text:style-name="P22" text:outline-level="4">2️⃣ Atualizar Task Scheduler</text:h>
      <text:list text:style-name="L9">
        <text:list-item>
          <text:p text:style-name="P34">Abra <text:span text:style-name="T5">taskschd.msc</text:span></text:p>
        </text:list-item>
        <text:list-item>
          <text:p text:style-name="P34">Clique direito em <text:span text:style-name="T5">Pesca v3.1 - Automação Diária</text:span> → <text:span text:style-name="T6">Properties</text:span></text:p>
        </text:list-item>
        <text:list-item>
          <text:p text:style-name="P35"><text:soft-page-break/>Separador <text:span text:style-name="T6">Actions</text:span> → <text:span text:style-name="T6">Edit</text:span>:</text:p>
          <text:list>
            <text:list-item>
              <text:p text:style-name="P34"><text:span text:style-name="T6">Program/script:</text:span> <text:span text:style-name="T5">D:\_WORK_\work_python_and_R\___WORK___\Previsao_Pesca\run_pesca_v3_1_automated.bat</text:span></text:p>
            </text:list-item>
            <text:list-item>
              <text:p text:style-name="P34"><text:span text:style-name="T6">Start in:</text:span> <text:span text:style-name="T5">D:\_WORK_\work_python_and_R\___WORK___\Previsao_Pesca</text:span></text:p>
            </text:list-item>
          </text:list>
        </text:list-item>
        <text:list-item>
          <text:p text:style-name="P34">Clique <text:span text:style-name="T6">OK</text:span>. (O agendador validará automaticamente o novo caminho.)</text:p>
        </text:list-item>
      </text:list>
      <text:h text:style-name="P22" text:outline-level="4">3️⃣ Teste de Validação</text:h>
      <text:p text:style-name="P7">cd D:\_WORK_\work_python_and_R\___WORK___\Previsao_Pesca<text:line-break/>run_pesca_v3_1_automated.bat</text:p>
      <text:p text:style-name="P21">Verifique <text:span text:style-name="T5">automacao_v3.1.log</text:span> → deve conter <text:span text:style-name="T5">[OK]</text:span> em todos os 4 passos.</text:p>
      <text:h text:style-name="P22" text:outline-level="4">4️⃣ Arquivar Origem (Opcional)</text:h>
      <text:p text:style-name="P21">Após 2-3 dias de operação estável na nova pasta:</text:p>
      <text:p text:style-name="P7"># Renomear origem para evitar execução acidental<text:line-break/>ren "D:\_WORK_\work_python_and_R\___WORK5___\Weather5" Weather5_BACKUP_20260528</text:p>
      <text:p text:style-name="P21">Se tudo correr bem, pode mover para um disco externo ou apagar.</text:p>
      <text:p text:style-name="P5"/>
      <text:p text:style-name="P21">✅ <text:span text:style-name="T6">Próximo passo:</text:span> Execute <text:span text:style-name="T5">python migrar_projeto_pesca_v3_2.py</text:span> para criar a pasta <text:span text:style-name="T5">___WORK___\Previsao_Pesca</text:span> com todos os ficheiros. A origem permanecerá 100% funcional. Quando o desenvolvimento novo estiver concluído, siga o checklist acima para o switch. Precisa de ajuda para adaptar mais algum script ou configurar o novo ambiente? 🎣⚙️</text:p>
      <text:p text:style-name="P21"/>
      <text:p text:style-name="P21">…………..</text:p>
      <text:p text:style-name="P36">Continuar agora com:<text:span text:style-name="T10"><text:line-break/>Dashboard Streamlit Community Cloud<text:line-break/><text:line-break/>Gerar script para criar Estrutura de Ficheiros e pastas para o Repositório. Pretende-se apenas que sejam criadas as direcorias/pastas.</text:span></text:p>
      <text:p text:style-name="P37">…..</text:p>
      <text:p text:style-name="P37"/>
      <text:p text:style-name="Text_20_body">(Pesquisas) D:_WORK_\work_python_and_R_<text:span text:style-name="T6">WORK5</text:span>_\Weather5&gt;python migrar_projeto_pesca_v3_2.py 📦 Iniciando migração v3.2... 📍 Origem: D:_WORK_\work_python_and_R_<text:span text:style-name="T6">WORK5</text:span>_\Weather5 📍 Destino: D:_WORK_\work_python_and_R_<text:span text:style-name="T6">WORK</text:span>_\Previsao_Pesca ✅ Diretório destino pronto: D:_WORK_\work_python_and_R_<text:span text:style-name="T6">WORK</text:span>_\Previsao_Pesca ✅ Migração concluída! 18 ficheiros copiados. 📁 Pasta: D:_WORK_\work_python_and_R_<text:span text:style-name="T6">WORK</text:span>_\Previsao_Pesca 📝 Log: migracao_log_20260528_201909.txt 💡 A origem (Weather5) permanece intacta e funcional.</text:p>
      <text:p text:style-name="Text_20_body"><text:soft-page-break/>(Pesquisas) D:_WORK_\work_python_and_R_<text:span text:style-name="T6">WORK5</text:span>_\Weather5&gt;cd D:_WORK_\work_python_and_R_<text:span text:style-name="T6">WORK</text:span>_\Previsao_Pesca</text:p>
      <text:p text:style-name="Text_20_body">(Pesquisas) D:_WORK_\work_python_and_R_<text:span text:style-name="T6">WORK</text:span>_\Previsao_Pesca&gt;python criar_estrutura_dashboard.py 📁 A criar estrutura do Dashboard Streamlit... 📍 Diretório alvo: D:_WORK_\work_python_and_R_<text:span text:style-name="T6">WORK</text:span>_\Previsao_Pesca\pesca-dashboard</text:p>
      <text:p text:style-name="Text_20_body">✅ pesca-dashboard.streamlit/ ✅ pesca-dashboard\assets/ ✅ pesca-dashboard\data/ ✅ pesca-dashboard\src/ ✅ pesca-dashboard\pages/</text:p>
      <text:p text:style-name="Text_20_body">🎉 Estrutura criada com sucesso! 📌 Próximo passo recomendado: cd pesca-dashboard git init &amp;&amp; git add . &amp;&amp; git commit -m 'Init: estrutura base dashboard'</text:p>
      <text:p text:style-name="Text_20_body">……….</text:p>
      <text:p text:style-name="Text_20_body"/>
      <text:p text:style-name="Text_20_body">Aqui está o script Python pronto a executar. Cria <text:span text:style-name="T6">exclusivamente as pastas</text:span> da estrutura acordada para o Streamlit Community Cloud.</text:p>
      <text:p text:style-name="Quotations">💡 <text:span text:style-name="T6">Nota técnica:</text:span> O Git não versiona pastas vazias. Para garantir que a estrutura seja mantida no repositório, o script cria automaticamente um ficheiro invisível <text:span text:style-name="T5">.gitkeep</text:span> em cada diretório. É prática padrão e não interfere com o desenvolvimento.</text:p>
      <text:h text:style-name="Heading_20_3" text:outline-level="3">📜 <text:span text:style-name="T5">criar_estrutura_dashboard.py</text:span></text:h>
      <text:p text:style-name="Text_20_body">Guarde na pasta <text:span text:style-name="T5">D:\_WORK_\work_python_and_R\___WORK___\Previsao_Pesca\</text:span> e execute.</text:p>
      <text:p text:style-name="P17">#!/usr/bin/env python3<text:line-break/># -*- coding: utf-8 -*-<text:line-break/>"""<text:line-break/>CRIAR ESTRUTURA DE PASTAS - DASHBOARD STREAMLIT<text:line-break/>Gera apenas as diretórios necessários para o repositório GitHub/Streamlit Cloud.<text:line-break/>"""<text:line-break/>import os<text:line-break/>from pathlib import Path<text:line-break/><text:line-break/># Diretório base (onde este script for executado)<text:line-break/>BASE_DIR = Path.cwd()<text:line-break/>DASHBOARD_DIR = BASE_DIR / "pesca-dashboard"<text:line-break/><text:line-break/># Estrutura oficial definida para o projeto Streamlit<text:line-break/>FOLDERS = [<text:line-break/> <text:s text:c="3"/>".streamlit", <text:s text:c="2"/># Configurações do app (theme, secrets, etc.)<text:line-break/> <text:s text:c="3"/>"assets", <text:s text:c="6"/># Imagens, logos, CSS personalizado<text:line-break/> <text:s text:c="3"/>"data", <text:s text:c="8"/># Ficheiros de dados (CSV, JSON, credentials.yml, etc.)<text:line-break/> <text:s text:c="3"/>"src", <text:s text:c="9"/># Módulos Python reutilizáveis (auth, data_loader, plots, etc.)<text:line-break/> <text:s text:c="3"/>"pages" <text:s text:c="8"/># Páginas secundárias do Streamlit (rotas automáticas)<text:line-break/>]<text:line-break/><text:line-break/>def criar_estrutura():<text:line-break/> <text:s text:c="3"/>print("📁 A criar estrutura do Dashboard Streamlit...")<text:line-break/> <text:s text:c="3"/>print(f"📍 Diretório alvo: {DASHBOARD_DIR}\n")<text:line-break/> <text:s text:c="3"/><text:line-break/> <text:s text:c="3"/>DASHBOARD_DIR.mkdir(parents=True, exist_ok=True)<text:line-break/> <text:s text:c="3"/><text:line-break/> <text:s text:c="3"/>for folder in FOLDERS:<text:line-break/><text:soft-page-break/> <text:s text:c="7"/>path = DASHBOARD_DIR / folder<text:line-break/> <text:s text:c="7"/>path.mkdir(parents=True, exist_ok=True)<text:line-break/> <text:s text:c="7"/><text:line-break/> <text:s text:c="7"/># Cria .gitkeep para o Git rastrear pastas vazias<text:line-break/> <text:s text:c="7"/>(path / ".gitkeep").touch()<text:line-break/> <text:s text:c="7"/><text:line-break/> <text:s text:c="7"/>print(f" <text:s/>✅ {path.relative_to(BASE_DIR)}/")<text:line-break/> <text:s text:c="7"/><text:line-break/> <text:s text:c="3"/>print(f"\n🎉 Estrutura criada com sucesso!")<text:line-break/> <text:s text:c="3"/>print("📌 Próximo passo recomendado:")<text:line-break/> <text:s text:c="3"/>print(" <text:s text:c="2"/>cd pesca-dashboard")<text:line-break/> <text:s text:c="3"/>print(" <text:s text:c="2"/>git init &amp;&amp; git add . &amp;&amp; git commit -m 'Init: estrutura base dashboard'")<text:line-break/><text:line-break/>if __name__ == "__main__":<text:line-break/> <text:s text:c="3"/>criar_estrutura()</text:p>
      <text:h text:style-name="Heading_20_3" text:outline-level="3">🛠️ Como Executar</text:h>
      <text:p text:style-name="P17">cd D:\_WORK_\work_python_and_R\___WORK___\Previsao_Pesca<text:line-break/>python criar_estrutura_dashboard.py</text:p>
      <text:h text:style-name="Heading_20_3" text:outline-level="3">📂 Resultado Esperado</text:h>
      <text:p text:style-name="P17">pesca-dashboard/<text:line-break/>├── .streamlit/<text:line-break/>│ <text:s text:c="2"/>└── .gitkeep<text:line-break/>├── assets/<text:line-break/>│ <text:s text:c="2"/>└── .gitkeep<text:line-break/>├── data/<text:line-break/>│ <text:s text:c="2"/>└── .gitkeep<text:line-break/>├── src/<text:line-break/>│ <text:s text:c="2"/>└── .gitkeep<text:line-break/>├── pages/<text:line-break/>│ <text:s text:c="2"/>└── .gitkeep<text:line-break/>└── (pronto para receber streamlit_app.py, requirements.txt, etc.)</text:p>
      <text:h text:style-name="Heading_20_3" text:outline-level="3">🔜 Próximos Passos (Quando estiver pronto)</text:h>
      <text:list text:style-name="L10">
        <text:list-item>
          <text:p text:style-name="P38">Inicialize o repositório: <text:span text:style-name="T5">cd pesca-dashboard &amp;&amp; git init</text:span></text:p>
        </text:list-item>
        <text:list-item>
          <text:p text:style-name="P38">Crie o ficheiro <text:span text:style-name="T5">streamlit_app.py</text:span> na raiz</text:p>
        </text:list-item>
        <text:list-item>
          <text:p text:style-name="P38">Adicione <text:span text:style-name="T5">requirements.txt</text:span> e <text:span text:style-name="T5">.streamlit/config.toml</text:span></text:p>
        </text:list-item>
        <text:list-item>
          <text:p text:style-name="P38">Faça push para GitHub e ligue ao Streamlit Community Cloud</text:p>
        </text:list-item>
      </text:list>
      <text:p text:style-name="Text_20_body">Quer que eu gere agora o <text:span text:style-name="T5">streamlit_app.py</text:span> base + <text:span text:style-name="T5">requirements.txt</text:span> + <text:span text:style-name="T5">.streamlit/config.toml</text:span> já configurados para autenticação e carregamento de dados, ou prefere avançar passo-a-passo? 🎣☁️</text:p>
      <text:p text:style-name="Text_20_body"/>
      <text:p text:style-name="Text_20_body"/>
      <text:p text:style-name="Text_20_body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egoe UI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Segoe UI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Segoe UI" style:font-family-asian="'Segoe UI'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Segoe UI" style:font-family-asian="'Segoe UI'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egoe UI" style:font-family-asian="'Segoe UI'"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nuel Mendes</meta:initial-creator>
    <meta:creation-date>2026-05-28T20:22:16.234012600</meta:creation-date>
    <dc:date>2026-05-28T22:01:06.263567800</dc:date>
    <dc:creator>Manuel Mendes</dc:creator>
    <meta:editing-duration>PT1H38M46S</meta:editing-duration>
    <meta:editing-cycles>6</meta:editing-cycles>
    <meta:generator>LibreOffice/26.2.1.2$Windows_X86_64 LibreOffice_project/620$Build-2</meta:generator>
    <meta:document-statistic meta:table-count="1" meta:image-count="0" meta:object-count="0" meta:page-count="19" meta:paragraph-count="178" meta:word-count="3609" meta:character-count="34015" meta:non-whitespace-character-count="27170"/>
  </office:meta>
</office:document-meta>
</file>